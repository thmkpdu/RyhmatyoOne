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wrap-option="wrap" style:vertical-align="top"/>
      <style:text-properties fo:color="#74747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9" table:default-cell-style-name="ce7"/>
        <table:table-column table:style-name="co7" table:number-columns-repeated="16368"/>
        <table:table-row table:style-name="ro1">
          <table:table-cell table:style-name="ce2" office:value-type="string" calcext:value-type="string">
            <text:p>Testaussuunitelma</text:p>
          </table:table-cell>
          <table:table-cell table:number-columns-repeated="15"/>
          <table:table-cell table:style-name="ce7" table:number-columns-repeated="16368"/>
        </table:table-row>
        <table:table-row table:style-name="ro2" table:number-rows-repeated="2">
          <table:table-cell table:number-columns-repeated="16"/>
          <table:table-cell table:style-name="ce7" table:number-columns-repeated="16368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Testaaja: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</table:table-row>
        <table:table-row table:style-name="ro2">
          <table:table-cell table:style-name="ce4" office:value-type="string" calcext:value-type="string">
            <text:p>Esimerkki: suunnitelman täyttö</text:p>
          </table:table-cell>
          <table:table-cell table:style-name="ce4" office:value-type="string" calcext:value-type="string">
            <text:p>Testaustiedot, pvm. Testaaja etc.</text:p>
          </table:table-cell>
          <table:table-cell table:style-name="ce4" office:value-type="string" calcext:value-type="string">
            <text:p>Testaajan nimi</text:p>
          </table:table-cell>
          <table:table-cell table:style-name="ce4" office:value-type="string" calcext:value-type="string">
            <text:p>Testipäivämäärä</text:p>
          </table:table-cell>
          <table:table-cell table:style-name="ce4" office:value-type="string" calcext:value-type="string">
            <text:p>Tietojen lisääminen onnistuu</text:p>
          </table:table-cell>
          <table:table-cell table:style-name="ce4" office:value-type="string" calcext:value-type="string">
            <text:p>Jokin ei toimi?</text:p>
          </table:table-cell>
          <table:table-cell table:style-name="ce4" office:value-type="string" calcext:value-type="string">
            <text:p>Läpäisty/Ei läpäisty</text:p>
          </table:table-cell>
          <table:table-cell table:style-name="ce4" table:number-columns-repeated="16377"/>
        </table:table-row>
        <table:table-row table:style-name="ro2">
          <table:table-cell table:style-name="ce6" office:value-type="string" calcext:value-type="string">
            <text:p>Etusivulle – siirtyminen osoite kirjoittamall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2">
          <table:table-cell table:style-name="ce6" office:value-type="string" calcext:value-type="string">
            <text:p>Etusivulle – siirtyminen kirjanmerkistä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3">
          <table:table-cell table:style-name="ce6" office:value-type="string" calcext:value-type="string">
            <text:p>Etusivu – sivun uudelleen lataaminen selaimen painikkeest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vun uudelleen lataaminen CTRL+F5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irtyminen Times and Prices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time_n_price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Info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info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Gallery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allery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Etusivu – siirtyminen Guestbook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uestbook.php scriptillä tuotettu sisältö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Frontpage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fp_info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Info - sisältä asettuu keskiteysti ja scrollaa alspäin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Scrollaus toimii tarvittavan määrän, kuvat ja teksti asettuu siististi toisiisna nähden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Gallery - kuvien hover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Gallery – kuvaa klikatessa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klikatessa esikatselukuvaan, halutu kuva suurenee ja on suljettavissa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0:00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näkyy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1:01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ei näy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Vieraskirja - Viestin lähettä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n voi lähettää ja se näkyy alakentässä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Vieraskirja - Kuinka pian voi uuden viestin jättää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Rate limit rajoittaa 1 viesti / 30 sekunttia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Vieraskirja - Toimiiko honeypot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Honeypot kenttä täytetty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Vieraskirja - Toimiiko time-check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viesti tulee kolmessa sekunnissa tai nopeammin scriptin lataamisesta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Times and prices – päivitetyt ajat näkyy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Näyttää tietokantaan tallennetut ajat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Admin – ensikirjautu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vaihtamaan salasanan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Admin – salasanan vaihto onnistuu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kirjautuaan uusiksi, kirjautuminen onnistuu uusilla tunnuksilla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Admin – salasanan vaihdon peruutus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etusivulle, pääsee asettamaan aikoja admin linkistä istuntoajan sisällä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salasanan vaihto ei onnistu jos uusi salasana on sama kuin vanha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salasanan vaihto ei onnistu jos uutta salasanaa ei krijoitettu 2 x samoi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salasanan vaihto ei onnistu jos vanhaa käyttätunnusta ei syötetty oike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salasanan vaihto ei onnistu jos vanhaa salasanaa ei syötetty oikei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Uusi käyttäjätunnus voi olla samakuin vanha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salasanan vaihto ei onnistu jos uutta käyttäjätunnusta ei ole syötetty 2 x samoi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Admin – salasanan vaihto ei onnistu jos vanhaa käyttäjtunnusta ei syötetty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Admin – automaattinen uloskirjaus</text:p>
          </table:table-cell>
          <table:table-cell table:style-name="ce6" table:number-columns-repeated="3"/>
          <table:table-cell table:style-name="ce6" office:value-type="string" calcext:value-type="string">
            <text:p>Istuntoajan kuluttua kirjaa automaattisesti ulos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Set times – noutaa ajat tietokannasta</text:p>
          </table:table-cell>
          <table:table-cell table:style-name="ce6" table:number-columns-repeated="3"/>
          <table:table-cell table:style-name="ce6" office:value-type="string" calcext:value-type="string">
            <text:p>Näyttää tallennetut ajat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Set times – talllentaa uudet ajat</text:p>
          </table:table-cell>
          <table:table-cell table:style-name="ce6" table:number-columns-repeated="3"/>
          <table:table-cell table:style-name="ce6" office:value-type="string" calcext:value-type="string">
            <text:p>Taikojen tallennus onnistuu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Set times – log out</text:p>
          </table:table-cell>
          <table:table-cell table:style-name="ce6" table:number-columns-repeated="3"/>
          <table:table-cell table:style-name="ce6" office:value-type="string" calcext:value-type="string">
            <text:p>Kirjautuu ulos napista painamalla</text:p>
          </table:table-cell>
          <table:table-cell table:style-name="ce6" table:number-columns-repeated="11"/>
        </table:table-row>
        <table:table-row table:style-name="ro4" table:number-rows-repeated="38">
          <table:table-cell table:style-name="ce6" table:number-columns-repeated="16"/>
        </table:table-row>
        <table:table-row table:style-name="ro6" table:number-rows-repeated="1048495">
          <table:table-cell table:number-columns-repeated="16"/>
          <table:table-cell table:style-name="ce7" table:number-columns-repeated="16368"/>
        </table:table-row>
        <table:table-row table:style-name="ro4" table:number-rows-repeated="4">
          <table:table-cell table:number-columns-repeated="16"/>
          <table:table-cell table:style-name="ce7" table:number-columns-repeated="16368"/>
        </table:table-row>
        <table:table-row table:style-name="ro4">
          <table:table-cell table:number-columns-repeated="16"/>
          <table:table-cell table:style-name="ce7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03:12:41.046232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103" meta:object-count="0"/>
  </office:meta>
</office:document-meta>
</file>