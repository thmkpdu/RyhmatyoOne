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i" fo:country="FI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fo:language="fi" fo:country="FI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7" table:number-columns-repeated="16368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5"/>
          <table:table-cell table:style-name="ce7" table:number-columns-repeated="16368"/>
        </table:table-row>
        <table:table-row table:style-name="ro2" table:number-rows-repeated="2">
          <table:table-cell table:number-columns-repeated="16"/>
          <table:table-cell table:style-name="ce7" table:number-columns-repeated="16368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3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3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3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3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</table:table-row>
        <table:table-row table:style-name="ro6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</table:table-row>
        <table:table-row table:style-name="ro7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Times and prices – päivitetyt ajat näkyy</text:p>
          </table:table-cell>
          <table:table-cell table:style-name="ce12"/>
          <table:table-cell table:style-name="ce11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Näyttää tietokantaan tallennetut ajat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Admin – ensikirjautuminen</text:p>
          </table:table-cell>
          <table:table-cell table:style-name="ce12"/>
          <table:table-cell table:style-name="ce11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Ohjaa vaihtamaan salasanan</text:p>
          </table:table-cell>
          <table:table-cell table:style-name="ce6" table:number-columns-repeated="11"/>
        </table:table-row>
        <table:table-row table:style-name="ro6">
          <table:table-cell table:style-name="ce11" office:value-type="string" calcext:value-type="string">
            <text:p>Admin – salasanan vaihto onnistuu</text:p>
          </table:table-cell>
          <table:table-cell table:style-name="ce12"/>
          <table:table-cell table:style-name="ce11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Ohjaa kirjautuaan uusiksi, kirjautuminen onnistuu uusilla tunnuksilla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Admin – salasanan vaihdon peruutus</text:p>
          </table:table-cell>
          <table:table-cell table:style-name="ce12"/>
          <table:table-cell table:style-name="ce11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Kirjaa ulos ja ohjaa etu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uusi salasana on sama kuin vanha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uutta salasanaa ei krijoitettu 2 x samoin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vanhaa käyttätunnusta ei syötetty oiken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vanhaa salasanaa ei syötetty oikein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Uusi käyttäjätunnus voi olla samakuin vanha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uutta käyttäjätunnusta ei ole syötetty 2 x samoin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Admin – salasanan vaihto ei onnistu jos vanhaa käyttäjtunnusta ei syötetty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Admin – automaattinen uloskirjaus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Istuntoajan kuluttua kirjaa automaattisesti ulos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Set times – noutaa ajat tietokannasta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Näyttää tallennetut ajat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Set times – talllentaa uudet ajat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Taikojen tallennus onnistuu</text:p>
          </table:table-cell>
          <table:table-cell table:style-name="ce6" table:number-columns-repeated="11"/>
        </table:table-row>
        <table:table-row table:style-name="ro4">
          <table:table-cell table:style-name="ce11" office:value-type="string" calcext:value-type="string">
            <text:p>Set times – log out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Kirjautuu ulos napista painamalla</text:p>
          </table:table-cell>
          <table:table-cell table:style-name="ce6" table:number-columns-repeated="11"/>
        </table:table-row>
        <table:table-row table:style-name="ro7">
          <table:table-cell table:style-name="ce11" office:value-type="string" calcext:value-type="string">
            <text:p>Set times – Aukemisaika ei voi olla sama tai myöhempi kuin sulkemisaika</text:p>
          </table:table-cell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1" office:value-type="string" calcext:value-type="string">
            <text:p>Ei tallenna mitään</text:p>
            <text:p>Kertoo käyttäjälle virheen</text:p>
            <text:p>Ohjaa takaisin Set times sivulle</text:p>
          </table:table-cell>
          <table:table-cell table:style-name="ce6" table:number-columns-repeated="11"/>
        </table:table-row>
        <table:table-row table:style-name="ro4" table:number-rows-repeated="30">
          <table:table-cell table:style-name="ce6" table:number-columns-repeated="16"/>
        </table:table-row>
        <table:table-row table:style-name="ro8" table:number-rows-repeated="1048506">
          <table:table-cell table:number-columns-repeated="16"/>
          <table:table-cell table:style-name="ce7" table:number-columns-repeated="16368"/>
        </table:table-row>
        <table:table-row table:style-name="ro4">
          <table:table-cell table:number-columns-repeated="16"/>
          <table:table-cell table:style-name="ce7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22:10:30.67613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117" meta:object-count="0"/>
    <meta:user-defined meta:name="ProgId">Excel.Sheet</meta:user-defined>
  </office:meta>
</office:document-meta>
</file>